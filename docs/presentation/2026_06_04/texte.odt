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6e23f" officeooo:paragraph-rsid="0006e23f"/>
    </style:style>
    <style:style style:name="P2" style:family="paragraph" style:parent-style-name="Standard" style:list-style-name="L1">
      <style:text-properties officeooo:rsid="0006e23f" officeooo:paragraph-rsid="0008bb95"/>
    </style:style>
    <style:style style:name="P3" style:family="paragraph" style:parent-style-name="Standard" style:list-style-name="L1">
      <style:text-properties officeooo:rsid="0008bb95" officeooo:paragraph-rsid="0008bb95"/>
    </style:style>
    <style:style style:name="P4" style:family="paragraph" style:parent-style-name="Standard" style:list-style-name="L1">
      <style:text-properties officeooo:rsid="0008bb95" officeooo:paragraph-rsid="001b0012"/>
    </style:style>
    <style:style style:name="P5" style:family="paragraph" style:parent-style-name="Standard" style:list-style-name="L1">
      <style:text-properties officeooo:rsid="0008bb95" officeooo:paragraph-rsid="001b4dbd"/>
    </style:style>
    <style:style style:name="T1" style:family="text">
      <style:text-properties officeooo:rsid="0008bb95"/>
    </style:style>
    <style:style style:name="T2" style:family="text">
      <style:text-properties officeooo:rsid="000b68cf"/>
    </style:style>
    <style:style style:name="T3" style:family="text">
      <style:text-properties officeooo:rsid="000c6164"/>
    </style:style>
    <style:style style:name="T4" style:family="text">
      <style:text-properties officeooo:rsid="000e6178"/>
    </style:style>
    <style:style style:name="T5" style:family="text">
      <style:text-properties officeooo:rsid="00106052"/>
    </style:style>
    <style:style style:name="T6" style:family="text">
      <style:text-properties officeooo:rsid="0011a892"/>
    </style:style>
    <style:style style:name="T7" style:family="text">
      <style:text-properties officeooo:rsid="0011ded3"/>
    </style:style>
    <style:style style:name="T8" style:family="text">
      <style:text-properties officeooo:rsid="00132d6c"/>
    </style:style>
    <style:style style:name="T9" style:family="text">
      <style:text-properties officeooo:rsid="001331e4"/>
    </style:style>
    <style:style style:name="T10" style:family="text">
      <style:text-properties officeooo:rsid="0014962f"/>
    </style:style>
    <style:style style:name="T11" style:family="text">
      <style:text-properties officeooo:rsid="0015b99b"/>
    </style:style>
    <style:style style:name="T12" style:family="text">
      <style:text-properties officeooo:rsid="0019490c"/>
    </style:style>
    <style:style style:name="T13" style:family="text">
      <style:text-properties officeooo:rsid="001b0012"/>
    </style:style>
    <style:style style:name="T14" style:family="text">
      <style:text-properties fo:font-weight="normal" officeooo:rsid="000b68cf" style:font-weight-asian="normal" style:font-weight-complex="normal"/>
    </style:style>
    <style:style style:name="T15" style:family="text">
      <style:text-properties fo:font-weight="normal" officeooo:rsid="000da66b" style:font-weight-asian="normal" style:font-weight-complex="normal"/>
    </style:style>
    <style:style style:name="T16" style:family="text">
      <style:text-properties fo:font-weight="normal" officeooo:rsid="00106052" style:font-weight-asian="normal" style:font-weight-complex="normal"/>
    </style:style>
    <style:style style:name="T17" style:family="text">
      <style:text-properties officeooo:rsid="001b4db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35524925" text:style-name="L1">
        <text:list-item>
          <text:p text:style-name="P1">Bonjour à tous, avant de commencer j’aimerais remercier <text:span text:style-name="T13">Rémy</text:span> pour cette <text:span text:style-name="T13">invitation </text:span>et vous remercier tous d’être présent aujourd’hui. Pour me présenter rapidement, je m’appelle Frédérique et je suis doctorante en 3ème année sous la supervision de Michel Duprez, Emmanuel Franck et Vanessa Lleras. Je suis rattachée à une équipe Inria qui s’appelle Mimesis et qui est basé à Strasbourg. Un des principal domaine d’application de l’équipe Mimesis c’est l’assistance chirurgical lors d’interventions complexes, et en particulier pour la chirurgie hépatique (donc liée au foie).</text:p>
        </text:list-item>
        <text:list-item>
          <text:p text:style-name="P1"/>
          <text:list>
            <text:list-item>
              <text:p text:style-name="P2">C’est donc dans ce contexte scientifique que ma thèse s’appuie. Plus précisément, le défi scientifique c’est la création en temps réel de jumeaux numériques d’organe tel que le foie. <text:span text:style-name="T1">Ainsi, pour répondre à ce défi, l’objective de cette thèse est le développement d’une méthode hybride combinant méthode élément fini et réseau de neurones, pour la résolution numérique d’EDP. En fait, les éléments finis ce sont des méthodes précises où des estimateurs d’erreurs théoriques sont déjà connus mais qui peuvent être très coûteuses, d’où l’intérêt de les coupler avec des réseaux de neurones (qui ont sont rapide et peuvent être paramétrique), ici on choisira des PINNs.</text:span></text:p>
              <text:p text:style-name="P3">Je <text:span text:style-name="T12">voulais</text:span> juste préciser le contexte dans lequel s’appuie la thèse mais le travail que je vais vous présenter aujourd’hui ne contient pas de simulation médicale, c’est un travail préliminaire dans le but d’évaluer si la méthode proposée est prometteuse.</text:p>
            </text:list-item>
            <text:list-item>
              <text:p text:style-name="P3">Le problème auquel nous allons nous intéresser dans un premier temps et le problème de Poisson avec condition de Dirichlet homogène sur un domaine spatiale Omega. On va étudier ce problème de manière paramétrique, c’est-à-dire que la solution et le terme source dépendent d’un certain paramètre mu qui vit dans l’espace paramétrique M.</text:p>
            </text:list-item>
          </text:list>
        </text:list-item>
        <text:list-item>
          <text:p text:style-name="P3">Commençons par les PINNs, soit Physics-Informed Neural Network, pour réseau de neurones informé par la physique. Concrètement un PINN c’est quoi ? C’est un réseau de neurones standard (type réseau dense) <text:s/>qui a comme entrée x et mu. Pourquoi on dit « informé par la physique » ? C’est parce que l’entraînement ne nécessite pas de données mais utilise la physique de l’équation. Concrètement, on cherche à résoudre le problème de minimisation suivant avec deux losses : une première sur le résidu de l’équation intégré sur le domaine spatiale et le domaine paramétrique et une seconde sur la condition de Dirichlet intégré sur le bord et sur le domaine paramétrique. En pratique, ce qu’on fait c’est qu’on discrétise ces losses en samplant des points dans nos domain<text:span text:style-name="T10">e</text:span> spatiale et paramétrique <text:span text:style-name="T7">(qu’on appelle point de collocation)</text:span>, en essayant de trouver le meilleur u_\theta possible.</text:p>
        </text:list-item>
        <text:list-item>
          <text:p text:style-name="P3"/>
          <text:list>
            <text:list-item>
              <text:p text:style-name="P5">La deuxième approche dont je vous ai parlé en introduction c’est les méthodes éléments finis. <text:span text:style-name="T2">Le principe de ces approches est de réécrire le problème sous une autre forme, qu’on appelle problème variationnelle. On construit alors un maillage de notre géométrie</text:span><text:span text:style-name="T14"> </text:span><text:span text:style-name="T15">(de tail</text:span><text:span text:style-name="T16">l</text:span><text:span text:style-name="T15">e caractéristique h)</text:span><text:span text:style-name="T2">, </text:span><text:span text:style-name="T13">ici cartésien, </text:span><text:span text:style-name="T2">sur lequel on va définir un espace continue, polynomiale par morceaux (de degré k). On cherche alors à déterminer une approximation polynomiale </text:span><text:span text:style-name="T4">u_h</text:span><text:span text:style-name="T2"> de la solution de l’EDP </text:span><text:span text:style-name="T7">u, </text:span><text:span text:style-name="T2">dans l’espace qu’on vient de construire. </text:span></text:p>
            </text:list-item>
            <text:list-item>
              <text:p text:style-name="P5"><text:span text:style-name="T2">En pratique, pour trouver u_h, on résout simplement un système linéaire avec A une matrice carré d’une certaine taille N_dofs. </text:span><text:span text:style-name="T3">Cette matrice dépend donc de ce qu’on appelle </text:span><text:span text:style-name="T8">l</text:span><text:span text:style-name="T3">es degrés de liberté </text:span><text:span text:style-name="T7">de l’espace</text:span><text:span text:style-name="T3"> qui sont des points associés aux cellules du maillage et dont le nombre dépend également du degré polynomiale k choisi. </text:span></text:p>
            </text:list-item>
            <text:list-item>
              <text:p text:style-name="P5"><text:span text:style-name="T17">Plus précisément</text:span><text:span text:style-name="T3">, </text:span><text:span text:style-name="T5">plus on augmente </text:span><text:span text:style-name="T13">le degré polynomial </text:span><text:span text:style-name="T5">k </text:span><text:span text:style-name="T17">et</text:span><text:span text:style-name="T5"> </text:span><text:span text:style-name="T3">plus </text:span><text:span text:style-name="T5">on raffine le maillage </text:span><text:span text:style-name="T17">(</text:span><text:span text:style-name="T13">c’est-à-dire on diminue </text:span><text:span text:style-name="T17">la taille caractéristique </text:span><text:span text:style-name="T13">h</text:span><text:span text:style-name="T17">), plus la solution est précise mais aussi </text:span><text:span text:style-name="T5">plus N_dofs est grand.</text:span><text:span text:style-name="T3"> </text:span></text:p>
            </text:list-item>
            <text:list-item>
              <text:p text:style-name="P4"><text:span text:style-name="T6">En résumé, si on veut une solution précise, on a un N_dofs grand et donc un gros sy</text:span><text:span text:style-name="T9">s</text:span><text:span text:style-name="T6">tème linéaire à résoudre, ce qui est coûteux… </text:span><text:span text:style-name="T11">et c’est ça qu’on va essayer d’améliorer.</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7T09:54:50.123412251</meta:creation-date>
    <meta:generator>LibreOffice/7.3.7.2$Linux_X86_64 LibreOffice_project/30$Build-2</meta:generator>
    <dc:date>2026-05-26T13:48:08.158857663</dc:date>
    <meta:editing-duration>PT2H7M20S</meta:editing-duration>
    <meta:editing-cycles>13</meta:editing-cycles>
    <meta:document-statistic meta:table-count="0" meta:image-count="0" meta:object-count="0" meta:page-count="1" meta:paragraph-count="11" meta:word-count="637" meta:character-count="3959" meta:non-whitespace-character-count="3337"/>
  </office:meta>
</office:document-meta>
</file>